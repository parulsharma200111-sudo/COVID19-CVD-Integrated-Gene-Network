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C0000028DB4F05B89.png" manifest:media-type="image/png"/>
  <manifest:file-entry manifest:full-path="Pictures/1000000000000295000002C6CBF85495.png" manifest:media-type="image/png"/>
  <manifest:file-entry manifest:full-path="Pictures/100000010000037A0000027C6C0EE2E5.png" manifest:media-type="image/png"/>
  <manifest:file-entry manifest:full-path="Pictures/10000001000005A600000261B4AD4B3B.png" manifest:media-type="image/png"/>
  <manifest:file-entry manifest:full-path="Pictures/100000010000010A000002BEF40E4AB9.png" manifest:media-type="image/png"/>
  <manifest:file-entry manifest:full-path="Pictures/10000001000006260000026149162830.png" manifest:media-type="image/png"/>
  <manifest:file-entry manifest:full-path="Pictures/1000000000000295000002C6E7E3A0F6.png" manifest:media-type="image/png"/>
  <manifest:file-entry manifest:full-path="Pictures/10000001000006C600000276981A9E27.png" manifest:media-type="image/png"/>
  <manifest:file-entry manifest:full-path="Pictures/10000001000003E30000020DD7EF618F.png" manifest:media-type="image/png"/>
  <manifest:file-entry manifest:full-path="Pictures/1000000100000443000004438ED0D0C7.png" manifest:media-type="image/png"/>
  <manifest:file-entry manifest:full-path="Pictures/10000001000003CB000002D058AF61F7.png" manifest:media-type="image/png"/>
  <manifest:file-entry manifest:full-path="Pictures/10000001000006F90000025C385D5C8F.png" manifest:media-type="image/png"/>
  <manifest:file-entry manifest:full-path="Pictures/10000001000003080000023E35E20F76.png" manifest:media-type="image/png"/>
  <manifest:file-entry manifest:full-path="Pictures/1000000000000295000002C6C0278E4D.png" manifest:media-type="image/png"/>
  <manifest:file-entry manifest:full-path="Pictures/100000010000072A0000028CBFE2CF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Standard" style:list-style-name="WWNum1"/>
    <style:style style:name="P2" style:family="paragraph" style:parent-style-name="Standard">
      <style:paragraph-properties fo:margin-left="0.5in"/>
    </style:style>
    <style:style style:name="P3" style:family="paragraph" style:parent-style-name="Standard">
      <style:paragraph-properties fo:margin-left="1in"/>
    </style:style>
    <style:style style:name="P4" style:family="paragraph" style:parent-style-name="Standard">
      <style:text-properties style:font-name="Times New Roman" style:font-name-complex="Times New Roman1"/>
    </style:style>
    <style:style style:name="P5" style:family="paragraph" style:parent-style-name="Standard">
      <style:text-properties style:font-name="Times New Roman" fo:font-weight="bold" style:font-weight-asian="bold" style:font-name-complex="Times New Roman1" style:font-weight-complex="bold"/>
    </style:style>
    <style:style style:name="P6" style:family="paragraph" style:parent-style-name="Standard">
      <style:paragraph-properties fo:text-align="center" style:justify-single-word="false"/>
      <style:text-properties style:font-name="Times New Roman" fo:font-weight="bold" style:font-weight-asian="bold" style:font-name-complex="Times New Roman1"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margin-top="0in" fo:margin-bottom="0.139in" style:contextual-spacing="false"/>
    </style:style>
    <style:style style:name="T1" style:family="text">
      <style:text-properties fo:font-size="16pt" fo:font-weight="bold" style:font-size-asian="16pt" style:font-weight-asian="bold"/>
    </style:style>
    <style:style style:name="T2" style:family="text">
      <style:text-properties style:font-name="Times New Roman" style:font-name-complex="Times New Roman1"/>
    </style:style>
    <style:style style:name="T3" style:family="text">
      <style:text-properties style:font-name="Times New Roman" fo:font-size="11pt" style:text-underline-style="solid" style:text-underline-width="auto" style:text-underline-color="font-color" fo:font-weight="normal" style:font-size-asian="11pt" style:font-weight-asian="normal" style:font-name-complex="Times New Roman1" style:font-weight-complex="normal"/>
    </style:style>
    <style:style style:name="T4"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5" style:family="text">
      <style:text-properties style:font-name="Times New Roman" style:text-underline-style="solid" style:text-underline-width="auto" style:text-underline-color="font-color" style:font-name-complex="Times New Roman1"/>
    </style:style>
    <style:style style:name="T6" style:family="text">
      <style:text-properties style:font-name="Times New Roman" fo:font-weight="bold" style:font-weight-asian="bold" style:font-name-complex="Times New Roman1" style:font-weight-complex="bold"/>
    </style:style>
    <style:style style:name="T7" style:family="text">
      <style:text-properties style:font-name="Times New Roman" fo:font-style="italic" style:font-style-asian="italic" style:font-name-complex="Times New Roman1" style:font-style-complex="italic"/>
    </style:style>
    <style:style style:name="T8" style:family="text">
      <style:text-properties fo:font-size="14pt" fo:font-weight="bold" style:font-size-asian="14pt" style:font-weight-asian="bold"/>
    </style:style>
    <style:style style:name="T9" style:family="text">
      <style:text-properties fo:font-size="11pt" style:font-size-asian="11pt"/>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1252in" fo:margin-top="0in" fo:margin-bottom="0in" style:wrap="parallel" style:number-wrapped-paragraphs="no-limit" style:wrap-contour="false"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2.1043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2"><text:span text:style-name="T1"><text:s/>Identification of Common Gene Signatures Between COVID-19 and Cardiovascular Disease (CVD)</text:span></text:p>
      <text:p text:style-name="Standard" loext:marker-style-name="T2">OBJECTIVE: To identify common molecular signatures between COVID-19 and Cardiovascular Disease (CVD) and understand their regulatory networks through protein interactions, transcription factors, and miRNA co-regulation.<text:span text:style-name="T2"/></text:p>
      <text:list text:style-name="WWNum1">
        <text:list-item>
          <text:p text:style-name="P1" loext:marker-style-name="T2"><text:span text:style-name="T2">Explore shared pathogenic mechanisms.</text:span><text:span text:style-name="T2"/></text:p>
        </text:list-item>
        <text:list-item>
          <text:p text:style-name="P1" loext:marker-style-name="T2"><text:span text:style-name="T2">Identify potential therapeutic targets.</text:span><text:span text:style-name="T2"/></text:p>
        </text:list-item>
        <text:list-item>
          <text:p text:style-name="P1" loext:marker-style-name="T2"><text:span text:style-name="T2">Understand regulatory networks linking both diseases.</text:span><text:span text:style-name="T2"/></text:p>
        </text:list-item>
      </text:list>
      <text:p text:style-name="Standard"><text:span text:style-name="T8">TOOLS &amp; SOFTWARE USED</text:span></text:p>
      <text:p text:style-name="Standard"><text:span text:style-name="T9">• GeneCards Database – Used for retrieval of disease-associated genes related to COVID-19 and cardiovascular disorders.</text:span></text:p>
      <text:p text:style-name="Standard"><text:span text:style-name="T9">• Venn Diagram Tool – Used to identify common genes shared between both diseases.</text:span></text:p>
      <text:p text:style-name="Standard"><text:span text:style-name="T9">• STRING Database – Used for protein–protein interaction (PPI) network construction and interaction analysis.</text:span></text:p>
      <text:p text:style-name="Standard"><text:span text:style-name="T9">• Cytoscape Software – Used for network visualization and hub gene analysis.</text:span></text:p>
      <text:p text:style-name="Standard"><text:span text:style-name="T9">• CytoHubba Plugin – Used inside Cytoscape to identify top hub genes based on network centrality scores.</text:span></text:p>
      <text:p text:style-name="Standard"><text:span text:style-name="T9">• Enrichr / DAVID / ShinyGO – Used for GO and KEGG pathway enrichment analysis.</text:span></text:p>
      <text:p text:style-name="Standard"><text:span text:style-name="T9">• NetworkAnalyst / RegNetwork – Used for transcription factor-gene and TF-miRNA co-regulatory network analysis.</text:span></text:p>
      <text:p text:style-name="Standard"><text:span text:style-name="T9">• Microsoft Excel – Used for data organization, filtering, and preprocessing.</text:span></text:p>
      <text:p text:style-name="Standard"><text:span text:style-name="T8">R-BASED BIOINFORMATICS ANALYSIS PIPELINE</text:span></text:p>
      <text:p text:style-name="Standard"><text:span text:style-name="T9">• R programming language was used for enrichment and pathway analysis of the selected hub genes.</text:span></text:p>
      <text:p text:style-name="Standard"><text:span text:style-name="T9">• CRAN packages including openxlsx and writexl were used for Excel file generation and export of enrichment results.</text:span></text:p>
      <text:p text:style-name="Standard"><text:span text:style-name="T9">• Bioconductor packages including clusterProfiler, org.Hs.eg.db, enrichplot, and ReactomePA were used for functional enrichment analysis.</text:span></text:p>
      <text:p text:style-name="Standard"><text:span text:style-name="T9">• Gene symbols were converted into ENTREZ IDs using the bitr() function from clusterProfiler.</text:span></text:p>
      <text:p text:style-name="Standard"><text:span text:style-name="T9">• GO enrichment analysis was performed using enrichGO() to identify enriched Biological Processes (BP), Cellular Components (CC), and Molecular Functions (MF).</text:span></text:p>
      <text:p text:style-name="Standard"><text:soft-page-break/><text:span text:style-name="T9">• KEGG pathway enrichment analysis was performed using enrichKEGG() to identify disease and signaling pathways associated with the shared genes.</text:span></text:p>
      <text:p text:style-name="Standard"><text:span text:style-name="T9">• Reactome pathway enrichment analysis was carried out using enrichPathway() for immune and cytokine signaling pathway analysis.</text:span></text:p>
      <text:p text:style-name="Standard" loext:marker-style-name="T10"><text:span text:style-name="T3">• The final GO, KEGG, and Reactome enrichment results were exported into Excel spreadsheets using write.xlsx().</text:span><text:span text:style-name="T3"/></text:p>
      <text:p text:style-name="Standard" loext:marker-style-name="T4"><text:span text:style-name="T4">METHODOLOGY</text:span><text:span text:style-name="T4"/></text:p>
      <text:p text:style-name="P2" loext:marker-style-name="T5"><text:span text:style-name="T2">1. </text:span><text:span text:style-name="T5">Data Collection</text:span></text:p>
      <text:p text:style-name="P3" loext:marker-style-name="T2"><text:span text:style-name="T2">Downloaded gene datasets related to COVID-19 and Cardiovascular disorders from GeneCards database.</text:span><text:span text:style-name="T2"/></text:p>
      <text:p text:style-name="P2" loext:marker-style-name="T2"><text:span text:style-name="T2">2. </text:span><text:span text:style-name="T5">Common Gene Identification</text:span></text:p>
      <text:p text:style-name="P3" loext:marker-style-name="T2"><text:span text:style-name="T2">Identified overlapping genes between both diseases using Venn diagram approach.</text:span><text:span text:style-name="T2"/></text:p>
      <text:p text:style-name="P2" loext:marker-style-name="T2"><text:span text:style-name="T2">3. </text:span><text:span text:style-name="T5">PPI Network Construction</text:span></text:p>
      <text:p text:style-name="P3" loext:marker-style-name="T2"><text:span text:style-name="T2">Uploaded common genes into STRING database and constructed protein-protein interaction network.</text:span><text:span text:style-name="T2"/></text:p>
      <text:p text:style-name="P2" loext:marker-style-name="T5"><text:span text:style-name="T2">4. </text:span><text:span text:style-name="T5">Hub Gene Identification</text:span></text:p>
      <text:p text:style-name="P3" loext:marker-style-name="T2"><text:span text:style-name="T2">Used Cytoscape with CytoHubba plugin to identify top hub genes based on degree or MCC scores.</text:span><text:span text:style-name="T2"/></text:p>
      <text:p text:style-name="P2" loext:marker-style-name="T2"><text:span text:style-name="T2">5. </text:span><text:span text:style-name="T5">Functional Enrichment Analysis</text:span></text:p>
      <text:p text:style-name="P3" loext:marker-style-name="T2"><text:span text:style-name="T2">Performed GO and KEGG pathway enrichment for hub genes using Enrichr, DAVID, or ShinyGO.</text:span><text:span text:style-name="T2"/></text:p>
      <text:p text:style-name="P2" loext:marker-style-name="T5"><text:span text:style-name="T2">6. </text:span><text:span text:style-name="T5">TF-Gene Network</text:span></text:p>
      <text:p text:style-name="P3" loext:marker-style-name="T2"><text:span text:style-name="T2">Constructed transcription factor-gene regulatory network using NetworkAnalyst or RegNetwork.</text:span><text:span text:style-name="T2"/></text:p>
      <text:p text:style-name="P2" loext:marker-style-name="T2"><text:span text:style-name="T2">7. </text:span><text:span text:style-name="T5">TF-miRNA Co-regulation</text:span></text:p>
      <text:p text:style-name="P3" loext:marker-style-name="T2"><text:span text:style-name="T2">Built TF-miRNA co-regulation network to understand post-transcriptional regulation.</text:span><text:span text:style-name="T2"/></text:p>
      <text:p text:style-name="P4" loext:marker-style-name="T2"/>
      <text:p text:style-name="P4" loext:marker-style-name="T2"/>
      <text:p text:style-name="P4" loext:marker-style-name="T2"/>
      <text:p text:style-name="P4" loext:marker-style-name="T2"/>
      <text:p text:style-name="P5" loext:marker-style-name="T6"/>
      <text:p text:style-name="P5" loext:marker-style-name="T6"/>
      <text:p text:style-name="Standard" loext:marker-style-name="T6"><text:soft-page-break/><text:span text:style-name="T6">KEY RESULTS </text:span><text:span text:style-name="T6"/></text:p>
      <text:p text:style-name="Standard" loext:marker-style-name="T6"><draw:frame draw:style-name="fr1" draw:name="Picture 1" text:anchor-type="as-char" svg:width="6.2681in" svg:height="2.4252in" draw:z-index="0"><draw:image xlink:href="Pictures/10000001000006260000026149162830.png" xlink:type="simple" xlink:show="embed" xlink:actuate="onLoad" draw:mime-type="image/png"/><svg:desc>A screenshot of a computer

AI-generated content may be incorrect.</svg:desc></draw:frame></text:p>
      <text:p text:style-name="Standard" loext:marker-style-name="T6"><text:span text:style-name="T6">Fig1: COVID 19 Gene list</text:span><text:span text:style-name="T6"/></text:p>
      <text:p text:style-name="Standard" loext:marker-style-name="T6"><text:span text:style-name="T6">This image Shows high relevance covered in 19 associated genes with descriptions, uniprot IDs, and GenCards links</text:span><text:span text:style-name="T6"/></text:p>
      <text:p text:style-name="Standard" loext:marker-style-name="T6"><draw:frame draw:style-name="fr1" draw:name="Image2" text:anchor-type="as-char" svg:width="6.2681in" svg:height="2.6398in" draw:z-index="1"><draw:image xlink:href="Pictures/10000001000005A600000261B4AD4B3B.png" xlink:type="simple" xlink:show="embed" xlink:actuate="onLoad" draw:mime-type="image/png"/><svg:desc>A screenshot of a computer

AI-generated content may be incorrect.</svg:desc></draw:frame></text:p>
      <text:p text:style-name="Standard" loext:marker-style-name="T6"><text:span text:style-name="T6">Fig2: This image shows top cardiovascular disease jeans ranked by relevance along with detailed annotation and data identifiers.</text:span><text:span text:style-name="T6"/></text:p>
      <text:p text:style-name="P5" loext:marker-style-name="T6"/>
      <text:p text:style-name="P5" loext:marker-style-name="T6"/>
      <text:p text:style-name="P5" loext:marker-style-name="T6"/>
      <text:p text:style-name="P5" loext:marker-style-name="T6"/>
      <text:p text:style-name="P5" loext:marker-style-name="T6"/>
      <text:p text:style-name="P7" loext:marker-style-name="T6"><text:soft-page-break/><draw:frame draw:style-name="fr1" draw:name="Image3" text:anchor-type="as-char" svg:width="6.061in" svg:height="4.3335in" draw:z-index="2"><draw:image xlink:href="Pictures/100000010000037A0000027C6C0EE2E5.png" xlink:type="simple" xlink:show="embed" xlink:actuate="onLoad" draw:mime-type="image/png"/><svg:desc>A diagram of a venn diagram

AI-generated content may be incorrect.</svg:desc></draw:frame></text:p>
      <text:p text:style-name="Standard" loext:marker-style-name="T6"><text:span text:style-name="T6">Fig3:</text:span> <text:span text:style-name="T6">Venn Diagram – Overlap of COVID-19 and cardiovascular disease (CVD) Genes </text:span></text:p>
      <text:p text:style-name="Standard" loext:marker-style-name="T2"><text:span text:style-name="T2">This Venn diagram shows the overlap between COVID-19 and cardiovascular disease gene sets, highlighting the shared genetic signatures underlying both conditions.</text:span><text:span text:style-name="T2"/></text:p>
      <text:p text:style-name="P7" loext:marker-style-name="T6"><draw:frame draw:style-name="fr3" draw:name="Image4" text:anchor-type="as-char" svg:width="1.3854in" svg:height="2.6043in" draw:z-index="3"><draw:image xlink:href="Pictures/100000010000010A000002BEF40E4AB9.png" xlink:type="simple" xlink:show="embed" xlink:actuate="onLoad" draw:mime-type="image/png"/><svg:desc>A white background with black text

AI-generated content may be incorrect.</svg:desc></draw:frame></text:p>
      <text:p text:style-name="Standard" loext:marker-style-name="T6"><text:span text:style-name="T6">Fig4: Show the intersecting genes shared between COVID-19 and CVD along with the genes uniquely present in each sets.</text:span><text:span text:style-name="T6"/></text:p>
      <text:p text:style-name="Standard" loext:marker-style-name="T2"><text:soft-page-break/><draw:frame draw:style-name="fr1" draw:name="Picture 2" text:anchor-type="as-char" svg:width="4.948in" svg:height="4.948in" draw:z-index="4"><draw:image xlink:href="Pictures/1000000100000443000004438ED0D0C7.png" xlink:type="simple" xlink:show="embed" xlink:actuate="onLoad" draw:mime-type="image/png"/></draw:frame><text:span text:style-name="T2"><text:s/></text:span></text:p>
      <text:p text:style-name="P6" loext:marker-style-name="T6"/>
      <text:p text:style-name="Standard" loext:marker-style-name="T6"><text:span text:style-name="T6">Fig5:</text:span> <text:span text:style-name="T6">STRING Database – Interaction Network of Common Genes </text:span></text:p>
      <text:p text:style-name="Standard" loext:marker-style-name="T2"><text:span text:style-name="T2">This STRING derived <text:s/>network visualises protein- protein interaction among these 7723 genes common to COVID-19 and CVD. Highly interconnected clusters reveal coordinated molecular functions, including cytokine signalling, immune activation, endovascular inflammation. Colour indicate functional enrichment, while dense edge reflect strong evidence of interaction. Hubs at the centre off the network suggest master regulators connecting multiple pathways relevant to disease severity. This global interaction may help identify critical biological modules that may be quotes regulated in both diseases.</text:span><text:span text:style-name="T2"/></text:p>
      <text:p text:style-name="P5" loext:marker-style-name="T6"/>
      <text:p text:style-name="P7" loext:marker-style-name="T6"><text:soft-page-break/><draw:frame draw:style-name="fr1" draw:name="Picture 3" text:anchor-type="as-char" svg:width="5.25in" svg:height="2.7689in" draw:z-index="5"><draw:image xlink:href="Pictures/10000001000003E30000020DD7EF618F.png" xlink:type="simple" xlink:show="embed" xlink:actuate="onLoad" draw:mime-type="image/png"/><svg:desc>A network of circles and lines

AI-generated content may be incorrect.</svg:desc></draw:frame></text:p>
      <text:p text:style-name="Standard" loext:marker-style-name="T2"><text:span text:style-name="T6">Fig6</text:span><text:span text:style-name="T2">: </text:span><text:span text:style-name="T6">Cytoscape – Top 20 Hub Genes (PPI Subnetwork)</text:span></text:p>
      <text:p text:style-name="Standard" loext:marker-style-name="T2"><text:span text:style-name="T2">This Cytoscape sub network highlighting the top 20 hub jeans ranked by degree centrality from the common gene set PPI network. Notes with warmer colour represent higher connectivity, indicating dominant regulatory roles. Hub genes form a tightly interconnected cluster, reflecting dairy involvement in key inflammatory, immunological, and vascular pathways. They act as central controller orchestrating multiple biological responses in COVID-19 and CVD. This condensed view helps prioritize candidate genes for biomarker discovery over therapeutic targeting. </text:span><text:span text:style-name="T2"/></text:p>
      <text:p text:style-name="P4" loext:marker-style-name="T2"/>
      <text:p text:style-name="P7" loext:marker-style-name="T2"><draw:frame draw:style-name="fr1" draw:name="Image5" text:anchor-type="as-char" svg:width="6.2681in" svg:height="2.1209in" draw:z-index="6"><draw:image xlink:href="Pictures/10000001000006F90000025C385D5C8F.png" xlink:type="simple" xlink:show="embed" xlink:actuate="onLoad" draw:mime-type="image/png"/><svg:desc>A black and white text

AI-generated content may be incorrect.</svg:desc></draw:frame></text:p>
      <text:p text:style-name="Standard" loext:marker-style-name="T2"><text:span text:style-name="T6">Fig7: This shows Cytoscape file contains network attributes for the top 20 sheared hub jeans derived from the COVID-19 and cardiovascular disorder venn overlap interaction</text:span><text:span text:style-name="T2">.</text:span></text:p>
      <text:p text:style-name="P4" loext:marker-style-name="T2"/>
      <text:p text:style-name="P4" loext:marker-style-name="T2"/>
      <text:p text:style-name="P7" loext:marker-style-name="T2"><text:soft-page-break/><draw:frame draw:style-name="fr1" draw:name="Picture 8" text:anchor-type="as-char" svg:width="3.528in" svg:height="2.611in" draw:z-index="7"><draw:image xlink:href="Pictures/10000001000003080000023E35E20F76.png" xlink:type="simple" xlink:show="embed" xlink:actuate="onLoad" draw:mime-type="image/png"/><svg:desc>A network of dots and lines

AI-generated content may be incorrect.</svg:desc></draw:frame></text:p>
      <text:p text:style-name="Standard" loext:marker-style-name="T6"><text:span text:style-name="T6">Fig8:</text:span> <text:span text:style-name="T6">Cytokine–Gene Interaction Network (Key Immune Regulators)</text:span></text:p>
      <text:p text:style-name="Standard" loext:marker-style-name="T2"><text:span text:style-name="T2">This network visualises interactions between major cytokines</text:span> <text:span text:style-name="T2">(red/orange nodes) and their associated genes (blue nodes). Major nodes such as TNF, IL1A, IL1B, and CXCL10 Emerge as dominant regulators. Their extensive connectivity reflects their central involvement in cytokine storm, endothelial injury, and chronic inflammation common to COVID-19 and CVD. </text:span></text:p>
      <text:p text:style-name="P7" loext:marker-style-name="T2"><draw:frame draw:style-name="fr1" draw:name="Picture 7" text:anchor-type="as-char" svg:width="4.1563in" svg:height="3.0728in" draw:z-index="8"><draw:image xlink:href="Pictures/10000001000003CB000002D058AF61F7.png" xlink:type="simple" xlink:show="embed" xlink:actuate="onLoad" draw:mime-type="image/png"/></draw:frame></text:p>
      <text:p text:style-name="Standard" loext:marker-style-name="T6"><text:span text:style-name="T6">Fig9: miRNA–Target Gene Interaction Network for Top 20 Hub Genes</text:span><text:span text:style-name="T6"/></text:p>
      <text:p text:style-name="Standard" loext:marker-style-name="T2"><text:span text:style-name="T2">Dish Network displaced miRNA (orange/red nodes) interacting with the </text:span><text:span text:style-name="T6">top 20 hub genes</text:span><text:span text:style-name="T2"> (blue nodes).highly connected miRNAs such as </text:span><text:span text:style-name="T7">hsa-miR-16-5p</text:span><text:span text:style-name="T2">, </text:span><text:span text:style-name="T7">hsa-miR-21-5p</text:span><text:span text:style-name="T2">, and </text:span><text:span text:style-name="T7">hsa-miR-126-5p </text:span><text:span text:style-name="T2">Regulate multiple hub genes simultaneously. The structure under scores the role of post transcriptional regulation in modulating immune response, vascular injury, end cytokine storm. These miRNA hubs may serve as sensitive biomarkers or potential intervention points in COVID-19 related cardiovascular complication the network also highlights miRNA gene feedback loop that shape disease progression.</text:span></text:p>
      <text:p text:style-name="P4" loext:marker-style-name="T2"><draw:frame draw:style-name="fr2" draw:name="Picture 11" text:anchor-type="char" svg:y="0.0008in" svg:width="5.5138in" svg:height="5.9165in" draw:z-index="14"><draw:image xlink:href="Pictures/1000000000000295000002C6E7E3A0F6.png" xlink:type="simple" xlink:show="embed" xlink:actuate="onLoad" draw:mime-type="image/png"/><svg:desc>A screenshot of a computer

AI-generated content may be incorrect.</svg:desc></draw:frame><text:soft-page-break/></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Standard" loext:marker-style-name="T6"><text:span text:style-name="T6">Fig8: GO enrichment Dot plot</text:span><text:span text:style-name="T6"/></text:p>
      <text:p text:style-name="Standard" loext:marker-style-name="T2"><text:span text:style-name="T2">This dot plot highlights enriched quo biological processes, cellular components, and molecular functions 4 the shared COVID-19-CVD genes, dominated by immune and cytokine related pathways.</text:span><text:span text:style-name="T2"/></text:p>
      <text:p text:style-name="P4" loext:marker-style-name="T2"/>
      <text:p text:style-name="Standard" loext:marker-style-name="T2"><text:line-break loext:clear="all"/></text:p>
      <text:p text:style-name="Standard" loext:marker-style-name="T2"><text:soft-page-break/><draw:frame draw:style-name="fr1" draw:name="Image6" text:anchor-type="as-char" svg:width="6.2681in" svg:height="2.2772in" draw:z-index="9"><draw:image xlink:href="Pictures/10000001000006C600000276981A9E27.png" xlink:type="simple" xlink:show="embed" xlink:actuate="onLoad" draw:mime-type="image/png"/><svg:desc>A screenshot of a computer

AI-generated content may be incorrect.</svg:desc></draw:frame></text:p>
      <text:p text:style-name="Standard" loext:marker-style-name="T6"><text:span text:style-name="T6">Fig9:</text:span> <text:span text:style-name="T6">GO Biological Process Enrichment</text:span></text:p>
      <text:p text:style-name="Standard" loext:marker-style-name="T2"><text:span text:style-name="T2">This shows enriched go biological processes for the common COVID 19-CVD genes, highlighting strong activation of immune and inflammatory pathways.</text:span><text:span text:style-name="T2"/></text:p>
      <text:p text:style-name="P7" loext:marker-style-name="T6"><draw:frame draw:style-name="fr1" draw:name="Picture 10" text:anchor-type="as-char" svg:width="4.1201in" svg:height="4.4217in" draw:z-index="10"><draw:image xlink:href="Pictures/1000000000000295000002C6C0278E4D.png" xlink:type="simple" xlink:show="embed" xlink:actuate="onLoad" draw:mime-type="image/png"/><svg:desc>A graph of a number of patients with a number of patients with a number of patients with a number of patients with a number of patients with a number of patients with a number of patients with a

AI-generated content may be incorrect.</svg:desc></draw:frame></text:p>
      <text:p text:style-name="Standard" loext:marker-style-name="T6"><text:span text:style-name="T6">Fig10: KEGG Disease Pathway Enrichment Plot</text:span><text:span text:style-name="T6"/></text:p>
      <text:p text:style-name="Standard" loext:marker-style-name="T2"><text:span text:style-name="T2">This KEGG plot shows significant enrichment of disease pathways including COVID-19, influenza, and inflammatory disorder among the common genes.</text:span><text:span text:style-name="T2"/></text:p>
      <text:p text:style-name="P4" loext:marker-style-name="T2"/>
      <text:p text:style-name="P4" loext:marker-style-name="T2"/>
      <text:p text:style-name="Standard" loext:marker-style-name="T2"><text:soft-page-break/><draw:frame draw:style-name="fr1" draw:name="Image7" text:anchor-type="as-char" svg:width="6.2681in" svg:height="2.2283in" draw:z-index="11"><draw:image xlink:href="Pictures/100000010000072A0000028CBFE2CFEA.png" xlink:type="simple" xlink:show="embed" xlink:actuate="onLoad" draw:mime-type="image/png"/><svg:desc>A white sheet with black text

AI-generated content may be incorrect.</svg:desc></draw:frame></text:p>
      <text:p text:style-name="Standard" loext:marker-style-name="T6"><text:span text:style-name="T6">Fig11:</text:span><text:span text:style-name="T11"> </text:span><text:span text:style-name="T6">KEGG Pathway Enrichment</text:span> <text:span text:style-name="T6">– Human Diseases</text:span></text:p>
      <text:p text:style-name="Standard" loext:marker-style-name="T2"><text:span text:style-name="T2">Show summarising KEGG disease pathways enriched in the shared genes set showing strong associations with immune disorders, infections, and cardiovascular conditions.</text:span><text:span text:style-name="T2"/></text:p>
      <text:p text:style-name="P7" loext:marker-style-name="T2"><draw:frame draw:style-name="fr1" draw:name="Picture 9" text:anchor-type="as-char" svg:width="3.852in" svg:height="4.1335in" draw:z-index="12"><draw:image xlink:href="Pictures/1000000000000295000002C6CBF85495.png" xlink:type="simple" xlink:show="embed" xlink:actuate="onLoad" draw:mime-type="image/png"/><svg:desc>A graph of a number of patients

AI-generated content may be incorrect.</svg:desc></draw:frame></text:p>
      <text:p text:style-name="Standard" loext:marker-style-name="T6"><text:span text:style-name="T6">Fig12:</text:span><text:span text:style-name="T11"> R</text:span><text:span text:style-name="T6">eactome/KEGG Cytokine &amp; Immune Signaling Enrichment Plot</text:span></text:p>
      <text:p text:style-name="Standard" loext:marker-style-name="T2"><text:span text:style-name="T2">This enrichment plot depicts strong activation of interleukin and cytokine signalling pathways underscoring immune dysregulation in the shared COVID-19 <text:s/>- CVD gene set.</text:span><text:span text:style-name="T2"/></text:p>
      <text:p text:style-name="Standard" loext:marker-style-name="T2"><text:soft-page-break/><draw:frame draw:style-name="fr1" draw:name="Image8" text:anchor-type="as-char" svg:width="6.2681in" svg:height="2.5902in" draw:z-index="13"><draw:image xlink:href="Pictures/100000010000062C0000028DB4F05B89.png" xlink:type="simple" xlink:show="embed" xlink:actuate="onLoad" draw:mime-type="image/png"/><svg:desc>A screenshot of a computer

AI-generated content may be incorrect.</svg:desc></draw:frame></text:p>
      <text:p text:style-name="Standard" loext:marker-style-name="T6"><text:span text:style-name="T6">Fig13:</text:span><text:span text:style-name="T11"> </text:span><text:span text:style-name="T6">KEGG Pathway Enrichment – Immune and Infection Pathways</text:span></text:p>
      <text:p text:style-name="Standard" loext:marker-style-name="T2"><text:span text:style-name="T2">This displays enriched </text:span><text:span text:style-name="T6">KEGG immune</text:span><text:span text:style-name="T2"> and infection related pathways, revealing cytokine signalling, viral response, and host- pathogen interaction as dominant modules.</text:span></text:p>
      <text:p text:style-name="Standard" loext:marker-style-name="T6"><text:span text:style-name="T8">Conclusion</text:span></text:p>
      <text:p text:style-name="Standard">This study successfully identified shared molecular signatures between COVID-19 and cardiovascular disease (CVD) using an integrated bioinformatics and systems biology approach. Through gene overlap analysis, protein–protein interaction networks, hub gene identification, and enrichment analysis, several common immune and inflammatory pathways were identified as major mechanistic links between the two diseases.<text:line-break/><text:line-break/>The enrichment results revealed strong involvement of cytokine signaling, interleukin-mediated pathways, immune activation, and inflammatory responses, suggesting that dysregulated immune signaling plays a critical role in COVID-19-associated cardiovascular complications. <text:span text:style-name="T11">Hub genes including TNF, IL6, IL1B, CXCL8, and STAT3</text:span> emerged as central regulators within the interaction network and may serve as potential biomarkers or therapeutic targets.<text:line-break/></text:p>
      <text:p text:style-name="Standard">Furthermore, TF-gene and miRNA co-regulatory network analysis revealed complex regulatory mechanisms involved in disease progression. GO, KEGG, and Reactome enrichment analyses identified common pathways including <text:span text:style-name="T11">cytokine signaling, IL-17 signaling, TNF-mediated inflammation, chemokine signaling, and immune response pathways</text:span>, suggesting that immune dysregulation and inflammatory responses are major shared mechanisms linking COVID-19 and cardiovascular disease (CVD).</text:p>
      <text:p text:style-name="P8">Overall, this study demonstrates how computational biology and network-based approaches can help uncover shared disease mechanisms and support the development of targeted therapeutic strategies for managing COVID-19-related cardiovascular complications.<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IN" style:letter-kerning="tru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365f91" loext:opacity="100%"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365f91" loext:opacity="100%"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365f9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365f9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365f9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mbria" fo:font-family="Cambria"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365f91" fo:border-bottom="0.51pt solid #365f91"/>
      <style:text-properties fo:color="#365f91" loext:opacity="100%" fo:font-style="italic" style:font-style-asian="italic" style:font-style-complex="italic">
        <loext:char-complex-color loext:theme-type="accent1" loext:color-type="theme">
          <loext:transformation loext:type="shade" loext:value="2509"/>
        </loext:char-complex-color>
      </style:text-properties>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365f91" loext:opacity="100%"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365f9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365f9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365f9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365f9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365f9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365f9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fo:font-size="10pt" style:font-size-asian="10pt" style:font-name-complex="Symbol1" style:font-family-complex="Symbol" style:font-family-generic-complex="system" style:font-pitch-complex="variable"/>
    </style:style>
    <style:style style:name="ListLabel_20_2" style:display-name="ListLabel 2" style:family="text">
      <style:text-properties fo:font-size="10pt" style:font-size-asian="10pt" style:font-name-complex="Courier New1" style:font-family-complex="'Courier New'" style:font-family-generic-complex="system" style:font-pitch-complex="variable"/>
    </style:style>
    <style:style style:name="ListLabel_20_3" style:display-name="ListLabel 3" style:family="text">
      <style:text-properties fo:font-size="10pt" style:font-size-asian="10pt" style:font-name-complex="Wingdings1" style:font-family-complex="Wingdings" style:font-family-generic-complex="system" style:font-pitch-complex="variable"/>
    </style:style>
    <style:style style:name="ListLabel_20_4" style:display-name="ListLabel 4" style:family="text">
      <style:text-properties fo:font-size="10pt" style:font-size-asian="10pt" style:font-name-complex="Wingdings1" style:font-family-complex="Wingdings" style:font-family-generic-complex="system" style:font-pitch-complex="variable"/>
    </style:style>
    <style:style style:name="ListLabel_20_5" style:display-name="ListLabel 5" style:family="text">
      <style:text-properties fo:font-size="10pt" style:font-size-asian="10pt" style:font-name-complex="Wingdings1" style:font-family-complex="Wingdings" style:font-family-generic-complex="system" style:font-pitch-complex="variable"/>
    </style:style>
    <style:style style:name="ListLabel_20_6" style:display-name="ListLabel 6" style:family="text">
      <style:text-properties fo:font-size="10pt" style:font-size-asian="10pt" style:font-name-complex="Wingdings1" style:font-family-complex="Wingdings" style:font-family-generic-complex="system" style:font-pitch-complex="variable"/>
    </style:style>
    <style:style style:name="ListLabel_20_7" style:display-name="ListLabel 7" style:family="text">
      <style:text-properties fo:font-size="10pt" style:font-size-asian="10pt" style:font-name-complex="Wingdings1" style:font-family-complex="Wingdings" style:font-family-generic-complex="system" style:font-pitch-complex="variable"/>
    </style:style>
    <style:style style:name="ListLabel_20_8" style:display-name="ListLabel 8" style:family="text">
      <style:text-properties fo:font-size="10pt" style:font-size-asian="10pt"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3T19:08:00</meta:creation-date>
    <meta:initial-creator>Parul Sharma</meta:initial-creator>
    <dc:language>en-US</dc:language>
    <dc:date>2026-05-27T19:14:14</dc:date>
    <meta:editing-cycles>3</meta:editing-cycles>
    <meta:editing-duration>PT6M</meta:editing-duration>
    <meta:generator>LibreOffice/24.2.7.2$Linux_X86_64 LibreOffice_project/420$Build-2</meta:generator>
    <meta:document-statistic meta:table-count="0" meta:image-count="15" meta:object-count="0" meta:page-count="11" meta:paragraph-count="85" meta:word-count="1196" meta:character-count="9055" meta:non-whitespace-character-count="7911"/>
    <meta:user-defined meta:name="AppVersion">15.0000</meta:user-defined>
    <meta:user-defined meta:name="Company">HP</meta:user-defined>
    <meta:template xlink:type="simple" xlink:actuate="onRequest" xlink:title="Normal" xlink:href=""/>
  </office:meta>
</office:document-meta>
</file>